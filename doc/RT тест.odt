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683000004F3D70185DB.jpg" manifest:media-type="image/jpeg"/>
  <manifest:file-entry manifest:full-path="Pictures/100000000000070D0000059DBF93BB24.jpg" manifest:media-type="image/jpe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6" style:family="table">
      <style:table-properties style:width="17cm" table:align="margins"/>
    </style:style>
    <style:style style:name="Table6.A" style:family="table-column">
      <style:table-column-properties style:column-width="17cm" style:rel-column-width="65535*"/>
    </style:style>
    <style:style style:name="Table6.A1" style:family="table-cell">
      <style:table-cell-properties fo:padding="0.097cm" fo:border="0.5pt solid #000000"/>
    </style:style>
    <style:style style:name="Table1" style:family="table">
      <style:table-properties style:width="17cm" table:align="margins"/>
    </style:style>
    <style:style style:name="Table1.A" style:family="table-column">
      <style:table-column-properties style:column-width="17cm" style:rel-column-width="65535*"/>
    </style:style>
    <style:style style:name="Table1.A1" style:family="table-cell">
      <style:table-cell-properties fo:padding="0.097cm" fo:border="0.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17cm" style:rel-column-width="65535*"/>
    </style:style>
    <style:style style:name="Table2.A1" style:family="table-cell">
      <style:table-cell-properties fo:padding="0.097cm" fo:border="0.5pt solid #000000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17cm" style:rel-column-width="65535*"/>
    </style:style>
    <style:style style:name="Table3.A1" style:family="table-cell">
      <style:table-cell-properties fo:padding="0.097cm" fo:border="0.5pt solid #00000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17cm" style:rel-column-width="65535*"/>
    </style:style>
    <style:style style:name="Table4.A1" style:family="table-cell">
      <style:table-cell-properties fo:padding="0.097cm" fo:border="0.5pt solid #000000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17cm" style:rel-column-width="65535*"/>
    </style:style>
    <style:style style:name="Table5.A1" style:family="table-cell">
      <style:table-cell-properties fo:padding="0.097cm" fo:border="0.5pt solid #000000"/>
    </style:style>
    <style:style style:name="P1" style:family="paragraph" style:parent-style-name="Heading_20_2">
      <style:paragraph-properties fo:text-align="center" style:justify-single-word="false"/>
      <style:text-properties officeooo:rsid="001c1b60" officeooo:paragraph-rsid="001c1b60"/>
    </style:style>
    <style:style style:name="P2" style:family="paragraph" style:parent-style-name="Heading_20_4">
      <style:text-properties officeooo:rsid="0021568c" officeooo:paragraph-rsid="0021568c"/>
    </style:style>
    <style:style style:name="P3" style:family="paragraph" style:parent-style-name="Text_20_body">
      <style:text-properties fo:language="ru" fo:country="RU" officeooo:rsid="00233cfe" officeooo:paragraph-rsid="00233cfe"/>
    </style:style>
    <style:style style:name="P4" style:family="paragraph" style:parent-style-name="Table_20_Contents">
      <style:paragraph-properties fo:text-align="start" style:justify-single-word="false"/>
      <style:text-properties style:font-name="Liberation Mono" fo:font-size="7pt" fo:font-weight="normal" officeooo:paragraph-rsid="00233cfe" style:font-size-asian="7pt" style:font-weight-asian="normal" style:font-size-complex="7pt" style:font-weight-complex="normal"/>
    </style:style>
    <style:style style:name="P5" style:family="paragraph" style:parent-style-name="Text_20_body">
      <style:paragraph-properties fo:text-align="start" style:justify-single-word="false"/>
      <style:text-properties fo:language="en" fo:country="US" officeooo:rsid="001c1b60" officeooo:paragraph-rsid="001c1b60"/>
    </style:style>
    <style:style style:name="P6" style:family="paragraph" style:parent-style-name="Table_20_Contents">
      <style:paragraph-properties fo:text-align="start" style:justify-single-word="false"/>
      <style:text-properties style:font-name="Liberation Mono" fo:font-size="8pt" fo:font-weight="normal" style:font-size-asian="8pt" style:font-weight-asian="normal" style:font-size-complex="8pt" style:font-weight-complex="normal"/>
    </style:style>
    <style:style style:name="P7" style:family="paragraph" style:parent-style-name="Table_20_Contents">
      <style:paragraph-properties fo:text-align="start" style:justify-single-word="false"/>
      <style:text-properties style:font-name="Liberation Mono" fo:font-size="8pt" fo:font-weight="normal" officeooo:paragraph-rsid="001dcae4" style:font-size-asian="8pt" style:font-weight-asian="normal" style:font-size-complex="8pt" style:font-weight-complex="normal"/>
    </style:style>
    <style:style style:name="P8" style:family="paragraph" style:parent-style-name="Standard">
      <style:paragraph-properties fo:text-align="start" style:justify-single-word="false"/>
      <style:text-properties fo:language="en" fo:country="US" officeooo:rsid="001c1b60" officeooo:paragraph-rsid="001dcae4"/>
    </style:style>
    <style:style style:name="P9" style:family="paragraph" style:parent-style-name="Text_20_body">
      <style:text-properties officeooo:rsid="0021568c" officeooo:paragraph-rsid="0021568c"/>
    </style:style>
    <style:style style:name="P10" style:family="paragraph" style:parent-style-name="Table_20_Contents">
      <style:text-properties style:font-name="Liberation Mono" fo:font-size="8pt" style:font-size-asian="8pt" style:font-size-complex="8pt"/>
    </style:style>
    <style:style style:name="P11" style:family="paragraph" style:parent-style-name="Text_20_body">
      <style:paragraph-properties fo:text-align="start" style:justify-single-word="false"/>
      <style:text-properties fo:language="en" fo:country="US" officeooo:rsid="001c1b60" officeooo:paragraph-rsid="0021568c"/>
    </style:style>
    <style:style style:name="P12" style:family="paragraph" style:parent-style-name="Table_20_Contents">
      <style:paragraph-properties fo:text-align="start" style:justify-single-word="false"/>
      <style:text-properties style:font-name="Liberation Mono" fo:font-size="8pt" fo:font-weight="normal" officeooo:paragraph-rsid="0021568c" style:font-size-asian="8pt" style:font-weight-asian="normal" style:font-size-complex="8pt" style:font-weight-complex="normal"/>
    </style:style>
    <style:style style:name="P13" style:family="paragraph" style:parent-style-name="Standard">
      <style:paragraph-properties fo:text-align="start" style:justify-single-word="false"/>
      <style:text-properties fo:language="en" fo:country="US" officeooo:rsid="001c1b60" officeooo:paragraph-rsid="0021568c"/>
    </style:style>
    <style:style style:name="P14" style:family="paragraph" style:parent-style-name="Heading_20_4">
      <style:text-properties officeooo:rsid="0027ce6a" officeooo:paragraph-rsid="0027ce6a"/>
    </style:style>
    <style:style style:name="P15" style:family="paragraph" style:parent-style-name="Text_20_body">
      <style:text-properties fo:language="ru" fo:country="RU" officeooo:rsid="0027ce6a" officeooo:paragraph-rsid="0027ce6a"/>
    </style:style>
    <style:style style:name="T1" style:family="text">
      <style:text-properties fo:language="en" fo:country="US"/>
    </style:style>
    <style:style style:name="T2" style:family="text">
      <style:text-properties officeooo:rsid="00253fa5"/>
    </style:style>
    <style:style style:name="T3" style:family="text">
      <style:text-properties fo:language="en" fo:country="US" officeooo:rsid="001c1b60"/>
    </style:style>
    <style:style style:name="T4" style:family="text">
      <style:text-properties fo:language="ru" fo:country="RU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language="en" fo:country="US" officeooo:rsid="0022dce2"/>
    </style:style>
    <style:style style:name="fr1" style:family="graphic" style:parent-style-name="Graphics">
      <style:graphic-properties fo:margin-left="0cm" fo:margin-right="0cm" fo:margin-top="0cm" fo:margin-bottom="0cm" style:run-through="foreground" style:wrap="dynamic" style:number-wrapped-paragraphs="no-limit" style:wrap-contour="false" style:vertical-pos="top" style:vertical-rel="baseline" style:horizontal-pos="center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2">Тестирование <text:span text:style-name="T1">PREEMPT_RT</text:span></text:h>
      <text:h text:style-name="P2" text:outline-level="4">Не<text:span text:style-name="T2"> </text:span>нагруженная система</text:h>
      <text:p text:style-name="P3">Тест:</text:p>
      <table:table table:name="Table6" table:style-name="Table6">
        <table:table-column table:style-name="Table6.A"/>
        <table:table-row>
          <table:table-cell table:style-name="Table6.A1" office:value-type="string">
            <text:p text:style-name="P4">cyclictest --mlockall --priority=80 --interval=200 --threads=$(nproc) --loops=<text:span text:style-name="T1">100</text:span><text:span text:style-name="T3">0</text:span><text:span text:style-name="T1">000</text:span> --distance=0</text:p>
          </table:table-cell>
        </table:table-row>
      </table:table>
      <text:p text:style-name="P3"/>
      <text:p text:style-name="P5">Linux luckfox 6.1.99-rt36 #3 SMP PREEMPT_RT, <text:span text:style-name="T4">задержка </text:span>Act, Avg, Max <text:span text:style-name="T4">в микросекундах</text:span>: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6"># /dev/cpu_dma_latency set to 0us</text:p>
            <text:p text:style-name="P6">policy: fifo: loadavg: 1.19 0.74 0.38 1/114 2389</text:p>
            <text:p text:style-name="P6"/>
            <text:p text:style-name="P6">T: 0 ( 2129) P:80 I:200 C:1000000 Min: <text:s text:c="5"/>7 Act: <text:s text:c="2"/>12 Avg: <text:s text:c="2"/>12 Max: <text:s text:c="5"/><text:span text:style-name="T5">70</text:span></text:p>
            <text:p text:style-name="P6">T: 1 ( 2130) P:80 I:200 C: 999947 Min: <text:s text:c="5"/>7 Act: <text:s text:c="2"/>21 Avg: <text:s text:c="2"/>12 Max: <text:s text:c="5"/><text:span text:style-name="T5">70</text:span></text:p>
            <text:p text:style-name="P6">T: 2 ( 2131) P:80 I:200 C: 999869 Min: <text:s text:c="5"/>7 Act: <text:s text:c="2"/>27 Avg: <text:s text:c="2"/>11 Max: <text:s text:c="5"/><text:span text:style-name="T5">63</text:span></text:p>
          </table:table-cell>
        </table:table-row>
      </table:table>
      <text:p text:style-name="P5"/>
      <text:p text:style-name="P5">Linux luckfox 6.1.99 #4 SMP PREEMPT: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P7"># /dev/cpu_dma_latency set to 0us</text:p>
            <text:p text:style-name="P7">policy: fifo: loadavg: 0.32 0.20 0.09 1/95 1911</text:p>
            <text:p text:style-name="P7"/>
            <text:p text:style-name="P7">T: 0 ( 1641) P:80 I:200 C:1000000 Min: <text:s text:c="5"/>7 Act: <text:s text:c="2"/>16 Avg: <text:s text:c="2"/>11 Max: <text:s text:c="4"/><text:span text:style-name="T5">557</text:span></text:p>
            <text:p text:style-name="P7">T: 1 ( 1642) P:80 I:200 C: 999923 Min: <text:s text:c="5"/>7 Act: <text:s text:c="2"/>18 Avg: <text:s text:c="2"/>12 Max: <text:s text:c="4"/><text:span text:style-name="T5">485</text:span></text:p>
            <text:p text:style-name="P7">T: 2 ( 1643) P:80 I:200 C: 999888 Min: <text:s text:c="5"/>7 Act: <text:s text:c="2"/>24 Avg: <text:s text:c="2"/>10 Max: <text:s text:c="4"/><text:span text:style-name="T5">125</text:span></text:p>
          </table:table-cell>
        </table:table-row>
      </table:table>
      <text:p text:style-name="P8"/>
      <text:h text:style-name="P2" text:outline-level="4"><text:span text:style-name="T4">Н</text:span>агруженная система</text:h>
      <text:p text:style-name="P9">Нагрузка<text:span text:style-name="T1">:</text:span></text:p>
      <table:table table:name="Table3" table:style-name="Table3">
        <table:table-column table:style-name="Table3.A"/>
        <table:table-row>
          <table:table-cell table:style-name="Table3.A1" office:value-type="string">
            <text:p text:style-name="P10">stress-ng --cpu $(nproc) --io 4 --vm 2 --vm-bytes <text:span text:style-name="T1">1</text:span><text:span text:style-name="T6">6</text:span><text:span text:style-name="T1">M</text:span> --fork 4</text:p>
          </table:table-cell>
        </table:table-row>
      </table:table>
      <text:p text:style-name="P9"/>
      <text:p text:style-name="P11">Linux luckfox 6.1.99-rt36 #3 SMP PREEMPT_RT:</text:p>
      <table:table table:name="Table4" table:style-name="Table4">
        <table:table-column table:style-name="Table4.A"/>
        <table:table-row>
          <table:table-cell table:style-name="Table4.A1" office:value-type="string">
            <text:p text:style-name="P12"># /dev/cpu_dma_latency set to 0us</text:p>
            <text:p text:style-name="P12">policy: fifo: loadavg: 16.05 14.09 8.55 14/137 1042</text:p>
            <text:p text:style-name="P12"/>
            <text:p text:style-name="P12">T: 0 ( 1805) P:80 I:200 C:1000000 Min: <text:s text:c="4"/>12 Act: <text:s text:c="2"/>32 Avg: <text:s text:c="2"/>31 Max: <text:s text:c="4"/><text:span text:style-name="T5">119</text:span></text:p>
            <text:p text:style-name="P12">T: 1 ( 1827) P:80 I:200 C: 999649 Min: <text:s text:c="4"/>11 Act: <text:s text:c="2"/>23 Avg: <text:s text:c="2"/>23 Max: <text:s text:c="4"/><text:span text:style-name="T5">136</text:span></text:p>
            <text:p text:style-name="P12">T: 2 ( 1861) P:80 I:200 C: 998637 Min: <text:s text:c="4"/>11 Act: <text:s text:c="2"/>37 Avg: <text:s text:c="2"/>31 Max: <text:s text:c="4"/><text:span text:style-name="T5">120</text:span></text:p>
          </table:table-cell>
        </table:table-row>
      </table:table>
      <text:p text:style-name="P11"/>
      <text:p text:style-name="P11">Linux luckfox 6.1.99 #4 SMP PREEMPT:</text:p>
      <table:table table:name="Table5" table:style-name="Table5">
        <table:table-column table:style-name="Table5.A"/>
        <table:table-row>
          <table:table-cell table:style-name="Table5.A1" office:value-type="string">
            <text:p text:style-name="P12"># /dev/cpu_dma_latency set to 0us</text:p>
            <text:p text:style-name="P12">policy: fifo: loadavg: 14.89 8.53 3.54 14/115 807</text:p>
            <text:p text:style-name="P12"/>
            <text:p text:style-name="P12">T: 0 ( <text:s/>388) P:80 I:200 C: 999217 Min: <text:s text:c="5"/>8 Act: <text:s text:c="2"/>27 Avg: <text:s text:c="2"/>29 Max: <text:s text:c="4"/><text:span text:style-name="T5">896</text:span></text:p>
            <text:p text:style-name="P12">T: 1 ( <text:s/>408) P:80 I:200 C:1000000 Min: <text:s text:c="4"/>13 Act: <text:s text:c="2"/>33 Avg: <text:s text:c="2"/>36 Max: <text:s text:c="4"/><text:span text:style-name="T5">490</text:span></text:p>
            <text:p text:style-name="P12">T: 2 ( <text:s/>432) P:80 I:200 C: 999464 Min: <text:s text:c="4"/>11 Act: <text:s text:c="2"/>33 Avg: <text:s text:c="2"/>27 Max: <text:s text:c="4"/><text:span text:style-name="T5">241</text:span></text:p>
          </table:table-cell>
        </table:table-row>
      </table:table>
      <text:p text:style-name="P13"/>
      <text:h text:style-name="P14" text:outline-level="4">Тест с <text:span text:style-name="T1">gpio</text:span></text:h>
      <text:p text:style-name="P15">Исходный текст: <text:a xlink:type="simple" xlink:href="https://github.com/p-a-gridin/GN/tree/4c99ccac6cf3ed815568723a4d1dcdfecff3c8b4/src/tests/rt_irq" text:style-name="Internet_20_link" text:visited-style-name="Visited_20_Internet_20_Link">rt_irq</text:a> </text:p>
      <text:p text:style-name="P15"/>
      <text:p text:style-name="P15">не нагруженная система:</text:p>
      <text:p text:style-name="P15"><text:soft-page-break/><draw:frame draw:style-name="fr1" draw:name="Image1" text:anchor-type="as-char" svg:width="13.892cm" svg:height="10.559cm" draw:z-index="0"><draw:image xlink:href="Pictures/1000000000000683000004F3D70185DB.jpg" xlink:type="simple" xlink:show="embed" xlink:actuate="onLoad" draw:mime-type="image/jpeg"/></draw:frame></text:p>
      <text:p text:style-name="P15"/>
      <text:p text:style-name="P15">нагруженная система:<text:line-break/><draw:frame draw:style-name="fr2" draw:name="Image2" text:anchor-type="as-char" svg:width="13.894cm" svg:height="11.061cm" draw:z-index="1"><draw:image xlink:href="Pictures/100000000000070D0000059DBF93BB24.jpg" xlink:type="simple" xlink:show="embed" xlink:actuate="onLoad" draw:mime-type="image/jpe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class="chapter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Figure" style:family="paragraph" style:parent-style-name="Caption" style:class="extra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draw:fill="none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5-04T19:29:56.926269000</meta:creation-date>
    <dc:date>2026-05-10T20:50:12.674107600</dc:date>
    <meta:editing-duration>PT55M40S</meta:editing-duration>
    <meta:editing-cycles>8</meta:editing-cycles>
    <meta:generator>LibreOffice/25.2.7.2$Windows_X86_64 LibreOffice_project/5cbfd1ab6520636bb5f7b99185aa69bd7456825d</meta:generator>
    <meta:document-statistic meta:table-count="6" meta:image-count="2" meta:object-count="0" meta:page-count="2" meta:paragraph-count="36" meta:word-count="319" meta:character-count="1779" meta:non-whitespace-character-count="1347"/>
  </office:meta>
</office:document-meta>
</file>